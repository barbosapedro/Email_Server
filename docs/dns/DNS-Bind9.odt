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B9000002506CC3D854.png" manifest:media-type="image/png"/>
  <manifest:file-entry manifest:full-path="Pictures/10000001000003B90000028443E7BFA3.png" manifest:media-type="image/png"/>
  <manifest:file-entry manifest:full-path="Pictures/10000001000003BD000001A413775178.png" manifest:media-type="image/png"/>
  <manifest:file-entry manifest:full-path="Pictures/10000001000003B40000014B2654E800.png" manifest:media-type="image/png"/>
  <manifest:file-entry manifest:full-path="Pictures/10000001000003B400000291AB6443A2.png" manifest:media-type="image/png"/>
  <manifest:file-entry manifest:full-path="Pictures/10000001000003B90000021E3AF060C1.png" manifest:media-type="image/png"/>
  <manifest:file-entry manifest:full-path="Pictures/10000001000003B800000255BB567CA9.png" manifest:media-type="image/png"/>
  <manifest:file-entry manifest:full-path="Pictures/10000001000003BD000001159FAFDCE6.png" manifest:media-type="image/png"/>
  <manifest:file-entry manifest:full-path="Pictures/10000001000003B7000002214B43AAED.png" manifest:media-type="image/png"/>
  <manifest:file-entry manifest:full-path="Pictures/10000001000003390000022E1CB1BC49.png" manifest:media-type="image/png"/>
  <manifest:file-entry manifest:full-path="Pictures/1000000100000340000001D1214109B3.png" manifest:media-type="image/png"/>
  <manifest:file-entry manifest:full-path="Pictures/1000000100000340000001CEFF13BEC6.png" manifest:media-type="image/png"/>
  <manifest:file-entry manifest:full-path="Pictures/1000000100000314000001DAD584A037.png" manifest:media-type="image/png"/>
  <manifest:file-entry manifest:full-path="Pictures/1000000100000442000002DEADE473A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399cm" style:rel-column-width="1927*"/>
    </style:style>
    <style:style style:name="Tabela1.B" style:family="table-column">
      <style:table-column-properties style:column-width="4.606cm" style:rel-column-width="2611*"/>
    </style:style>
    <style:style style:name="Tabela1.C" style:family="table-column">
      <style:table-column-properties style:column-width="4.895cm" style:rel-column-width="2775*"/>
    </style:style>
    <style:style style:name="Tabela1.D" style:family="table-column">
      <style:table-column-properties style:column-width="4.101cm" style:rel-column-width="2325*"/>
    </style:style>
    <style:style style:name="Tabela1.A1" style:family="table-cell">
      <style:table-cell-properties style:writing-mode="page"/>
    </style:style>
    <style:style style:name="P1" style:family="paragraph" style:parent-style-name="Standard">
      <style:text-properties officeooo:rsid="00087082" officeooo:paragraph-rsid="00087082"/>
    </style:style>
    <style:style style:name="P2" style:family="paragraph" style:parent-style-name="Standard">
      <style:text-properties officeooo:paragraph-rsid="00087082"/>
    </style:style>
    <style:style style:name="P3" style:family="paragraph" style:parent-style-name="Standard">
      <style:text-properties officeooo:rsid="000c46b7" officeooo:paragraph-rsid="000c46b7"/>
    </style:style>
    <style:style style:name="P4" style:family="paragraph" style:parent-style-name="Table_20_Contents">
      <style:text-properties officeooo:rsid="000dec5d" officeooo:paragraph-rsid="000dec5d"/>
    </style:style>
    <style:style style:name="P5" style:family="paragraph" style:parent-style-name="Standard">
      <style:text-properties officeooo:rsid="000dec5d" officeooo:paragraph-rsid="000dec5d"/>
    </style:style>
    <style:style style:name="P6" style:family="paragraph" style:parent-style-name="Standard">
      <style:text-properties officeooo:rsid="0009886c" officeooo:paragraph-rsid="0009886c"/>
    </style:style>
    <style:style style:name="P7" style:family="paragraph" style:parent-style-name="Standard">
      <style:text-properties officeooo:rsid="000a5329" officeooo:paragraph-rsid="000a5329"/>
    </style:style>
    <style:style style:name="P8" style:family="paragraph" style:parent-style-name="Standard">
      <style:text-properties officeooo:rsid="000bd5be" officeooo:paragraph-rsid="000bd5be"/>
    </style:style>
    <style:style style:name="P9" style:family="paragraph" style:parent-style-name="Standard">
      <style:text-properties officeooo:rsid="000be18f" officeooo:paragraph-rsid="000be18f"/>
    </style:style>
    <style:style style:name="P10" style:family="paragraph" style:parent-style-name="Standard">
      <style:text-properties officeooo:rsid="000be338" officeooo:paragraph-rsid="000be338"/>
    </style:style>
    <style:style style:name="T1" style:family="text">
      <style:text-properties officeooo:rsid="00087082"/>
    </style:style>
    <style:style style:name="T2" style:family="text">
      <style:text-properties fo:color="#70b8ff" loext:opacity="100%"/>
    </style:style>
    <style:style style:name="T3" style:family="text">
      <style:text-properties officeooo:rsid="000dec5d"/>
    </style:style>
    <style:style style:name="T4" style:family="text">
      <style:text-properties officeooo:rsid="0009886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NS Interno com Bind9</text:p>
      <text:p text:style-name="P1"/>
      <text:p text:style-name="P2"><text:span text:style-name="T1">-instalar bind9 (servidor dns) bind9utils (logs named-checkconf, named-checkzone)</text:span></text:p>
      <text:p text:style-name="P1">bind9doc dnsutils (testes dig, nslookup)</text:p>
      <text:p text:style-name="P1"/>
      <text:p text:style-name="P1"><text:span text:style-name="T2">sudo</text:span> <text:span text:style-name="T2">apt</text:span> <text:span text:style-name="T2">install</text:span> -y bind9 bind9utils bind9-doc dnsutils</text:p>
      <text:p text:style-name="P1"/>
      <text:p text:style-name="P3">Configurar DNS Interno com bind9 para resolver o domínio lab.local</text:p>
      <text:p text:style-name="P3">Ativar MX, PTR, SPF e no futuro DKIM/DMARC records</text:p>
      <text:p text:style-name="P3"/>
      <text:p text:style-name="P3">MX- mail exchanger</text:p>
      <text:p text:style-name="P3">PTR- registo DNS de pesquisa inversa IP para Nome de Dominio</text:p>
      <text:p text:style-name="P3">SPF- sender policy framework metodo de autenticação de e-mail que valida as origens das mensagens, usa um registro TXT no DNS para autorizar servidores de IP a enviar e-mail em nome de um domínio. Impede falsificações (spoofing), protege contra phishing e evite que e-mails legitimos caiam no spam. <text:span text:style-name="T3">(neste lab só autoriza no próprio domínio)</text:span></text:p>
      <text:p text:style-name="P3"/>
      <text:p text:style-name="P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4">Tipo Registo</text:p>
          </table:table-cell>
          <table:table-cell table:style-name="Tabela1.A1" office:value-type="string">
            <text:p text:style-name="P4">Nome</text:p>
          </table:table-cell>
          <table:table-cell table:style-name="Tabela1.A1" office:value-type="string">
            <text:p text:style-name="P4">Valor</text:p>
          </table:table-cell>
          <table:table-cell table:style-name="Tabela1.A1" office:value-type="string">
            <text:p text:style-name="P4">Função</text:p>
          </table:table-cell>
        </table:table-row>
        <table:table-row>
          <table:table-cell table:style-name="Tabela1.A1" office:value-type="string">
            <text:p text:style-name="P4">A</text:p>
          </table:table-cell>
          <table:table-cell table:style-name="Tabela1.A1" office:value-type="string">
            <text:p text:style-name="P4">mailserver.lab.local</text:p>
          </table:table-cell>
          <table:table-cell table:style-name="Tabela1.A1" office:value-type="string">
            <text:p text:style-name="Table_20_Contents">192.168.1.61 </text:p>
          </table:table-cell>
          <table:table-cell table:style-name="Tabela1.A1" office:value-type="string">
            <text:p text:style-name="P4">Main Server</text:p>
          </table:table-cell>
        </table:table-row>
        <table:table-row>
          <table:table-cell table:style-name="Tabela1.A1" office:value-type="string">
            <text:p text:style-name="P4">A</text:p>
          </table:table-cell>
          <table:table-cell table:style-name="Tabela1.A1" office:value-type="string">
            <text:p text:style-name="P4">mail.lab.local</text:p>
          </table:table-cell>
          <table:table-cell table:style-name="Tabela1.A1" office:value-type="string">
            <text:p text:style-name="Table_20_Contents">192.168.1.61 </text:p>
          </table:table-cell>
          <table:table-cell table:style-name="Tabela1.A1" office:value-type="string">
            <text:p text:style-name="Table_20_Contents">Mail alias </text:p>
          </table:table-cell>
        </table:table-row>
        <table:table-row>
          <table:table-cell table:style-name="Tabela1.A1" office:value-type="string">
            <text:p text:style-name="P4">MX</text:p>
          </table:table-cell>
          <table:table-cell table:style-name="Tabela1.A1" office:value-type="string">
            <text:p text:style-name="P4">lab.local</text:p>
          </table:table-cell>
          <table:table-cell table:style-name="Tabela1.A1" office:value-type="string">
            <text:p text:style-name="Table_20_Contents">mailserver.lab.local (priority 10) </text:p>
          </table:table-cell>
          <table:table-cell table:style-name="Tabela1.A1" office:value-type="string">
            <text:p text:style-name="Table_20_Contents">Mail routing </text:p>
          </table:table-cell>
        </table:table-row>
        <table:table-row>
          <table:table-cell table:style-name="Tabela1.A1" office:value-type="string">
            <text:p text:style-name="P4">PTR</text:p>
          </table:table-cell>
          <table:table-cell table:style-name="Tabela1.A1" office:value-type="string">
            <text:p text:style-name="P4">61.1.168.192.in-addr.arpa</text:p>
          </table:table-cell>
          <table:table-cell table:style-name="Tabela1.A1" office:value-type="string">
            <text:p text:style-name="P4">mailserver.lab.local</text:p>
          </table:table-cell>
          <table:table-cell table:style-name="Tabela1.A1" office:value-type="string">
            <text:p text:style-name="Table_20_Contents">Reverse DNS </text:p>
          </table:table-cell>
        </table:table-row>
        <table:table-row>
          <table:table-cell table:style-name="Tabela1.A1" office:value-type="string">
            <text:p text:style-name="P4">TXT</text:p>
          </table:table-cell>
          <table:table-cell table:style-name="Tabela1.A1" office:value-type="string">
            <text:p text:style-name="P4">lab.local</text:p>
          </table:table-cell>
          <table:table-cell table:style-name="Tabela1.A1" office:value-type="string">
            <text:p text:style-name="Table_20_Contents">v=spf1 ip4:192.168.1.61 -all </text:p>
          </table:table-cell>
          <table:table-cell table:style-name="Tabela1.A1" office:value-type="string">
            <text:p text:style-name="Table_20_Contents">SPF <text:span text:style-name="T3">básico</text:span></text:p>
          </table:table-cell>
        </table:table-row>
      </table:table>
      <text:p text:style-name="P5"/>
      <text:p text:style-name="P1"/>
      <text:p text:style-name="P1"><draw:frame draw:style-name="fr1" draw:name="Imagem1" text:anchor-type="char" svg:width="17cm" svg:height="10.559cm" draw:z-index="0"><draw:image xlink:href="Pictures/10000001000003B9000002506CC3D854.png" xlink:type="simple" xlink:show="embed" xlink:actuate="onLoad" draw:mime-type="image/png"/></draw:frame>.</text:p>
      <text:p text:style-name="P1"/>
      <text:p text:style-name="P1"/>
      <text:p text:style-name="P1"/>
      <text:p text:style-name="P1"><text:soft-page-break/>/etc/bind/</text:p>
      <text:p text:style-name="P1"><text:tab/>-named.conf (inclui todos os ficheiros)</text:p>
      <text:p text:style-name="P1"><text:tab/>-named.conf.options (configs globais <text:span text:style-name="T4">do </text:span>DNS)</text:p>
      <text:p text:style-name="P1"><text:tab/>-named.conf.local <text:span text:style-name="T4">(zonas)</text:span></text:p>
      <text:p text:style-name="P1"><text:tab/>-<text:span text:style-name="T4">named.conf.default-zones</text:span></text:p>
      <text:p text:style-name="P1"><text:tab/>-<text:span text:style-name="T4">db.*</text:span></text:p>
      <text:p text:style-name="P1"/>
      <text:p text:style-name="P1"/>
      <text:p text:style-name="P1"/>
      <text:p text:style-name="P6">Configs globais DNS</text:p>
      <text:p text:style-name="P6"/>
      <text:p text:style-name="P7">só aceitar queries da rede local</text:p>
      <text:p text:style-name="P7">evitar que o servidor seja usado como open resolver</text:p>
      <text:p text:style-name="P7">reencaminhar domínios desconhecidos para google/cloudflare</text:p>
      <text:p text:style-name="P8">desativar transferencia de zona para qualquer um</text:p>
      <text:p text:style-name="P8">escutar todas interfaces IPv4 desativar IPv6</text:p>
      <text:p text:style-name="P8">dnssec validation no para manter o lab simples e funcional</text:p>
      <text:p text:style-name="P8"/>
      <text:p text:style-name="P8"><draw:frame draw:style-name="fr1" draw:name="Imagem2" text:anchor-type="char" svg:width="17cm" svg:height="11.486cm" draw:z-index="1"><draw:image xlink:href="Pictures/10000001000003B90000028443E7BFA3.png" xlink:type="simple" xlink:show="embed" xlink:actuate="onLoad" draw:mime-type="image/png"/></draw:frame>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>/etc/bind/named.conf.local</text:p>
      <text:p text:style-name="P8">zona direta – resolve nomes para Ips</text:p>
      <text:p text:style-name="P8">zona reversa – resolve Ips para nomes</text:p>
      <text:p text:style-name="P8"/>
      <text:p text:style-name="P8"><draw:frame draw:style-name="fr1" draw:name="Imagem3" text:anchor-type="char" svg:width="17cm" svg:height="7.459cm" draw:z-index="2"><draw:image xlink:href="Pictures/10000001000003BD000001A413775178.png" xlink:type="simple" xlink:show="embed" xlink:actuate="onLoad" draw:mime-type="image/png"/></draw:frame>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Zona direta db.lab.local | <text:a xlink:type="simple" xlink:href="mailto:admin@lab.local" text:style-name="Internet_20_link" text:visited-style-name="Visited_20_Internet_20_Link">admin@lab.local</text:a> |</text:p>
      <text:p text:style-name="P9"><draw:frame draw:style-name="fr1" draw:name="Imagem4" text:anchor-type="char" svg:width="17cm" svg:height="11.781cm" draw:z-index="3"><draw:image xlink:href="Pictures/10000001000003B400000291AB6443A2.png" xlink:type="simple" xlink:show="embed" xlink:actuate="onLoad" draw:mime-type="image/png"/></draw:frame><text:soft-page-break/>.</text:p>
      <text:p text:style-name="P9"/>
      <text:p text:style-name="P9"/>
      <text:p text:style-name="P9"/>
      <text:p text:style-name="P9">Zona Reversa db.192.168.1</text:p>
      <text:p text:style-name="P9"/>
      <text:p text:style-name="P9"><draw:frame draw:style-name="fr1" draw:name="Imagem5" text:anchor-type="char" svg:width="17cm" svg:height="9.668cm" draw:z-index="4"><draw:image xlink:href="Pictures/10000001000003B90000021E3AF060C1.png" xlink:type="simple" xlink:show="embed" xlink:actuate="onLoad" draw:mime-type="image/png"/></draw:frame>.</text:p>
      <text:p text:style-name="P9"/>
      <text:p text:style-name="P9"><text:soft-page-break/></text:p>
      <text:p text:style-name="P9"/>
      <text:p text:style-name="P9">Validar configs – sudo named-checkconf</text:p>
      <text:p text:style-name="P9"><draw:frame draw:style-name="fr1" draw:name="Imagem6" text:anchor-type="char" svg:width="17cm" svg:height="4.919cm" draw:z-index="5"><draw:image xlink:href="Pictures/10000001000003BD000001159FAFDCE6.png" xlink:type="simple" xlink:show="embed" xlink:actuate="onLoad" draw:mime-type="image/png"/></draw:frame>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Restart no serviço bind9</text:p>
      <text:p text:style-name="P9"><draw:frame draw:style-name="fr1" draw:name="Imagem7" text:anchor-type="char" svg:width="17cm" svg:height="10.659cm" draw:z-index="6"><draw:image xlink:href="Pictures/10000001000003B800000255BB567CA9.png" xlink:type="simple" xlink:show="embed" xlink:actuate="onLoad" draw:mime-type="image/png"/></draw:frame><text:soft-page-break/>.</text:p>
      <text:p text:style-name="P10">Apontar o próprio servidor para o seu bind9 em /etc/netplan</text:p>
      <text:p text:style-name="P10">alterar nameservers para apontar para 127.0.0.1 e fazer sudo netplan apply</text:p>
      <text:p text:style-name="P10"><draw:frame draw:style-name="fr1" draw:name="Imagem8" text:anchor-type="char" svg:width="17cm" svg:height="5.934cm" draw:z-index="7"><draw:image xlink:href="Pictures/10000001000003B40000014B2654E800.png" xlink:type="simple" xlink:show="embed" xlink:actuate="onLoad" draw:mime-type="image/png"/></draw:frame>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Testes de diagnostico usando “dig”</text:p>
      <text:p text:style-name="P10">Registo A , Registo MX, Registo PTR e resolução externa</text:p>
      <text:p text:style-name="P10"><draw:frame draw:style-name="fr1" draw:name="Imagem9" text:anchor-type="char" svg:width="17cm" svg:height="9.742cm" draw:z-index="8"><draw:image xlink:href="Pictures/10000001000003B7000002214B43AAED.png" xlink:type="simple" xlink:show="embed" xlink:actuate="onLoad" draw:mime-type="image/png"/></draw:frame><text:soft-page-break/>.</text:p>
      <text:p text:style-name="P10"><draw:frame draw:style-name="fr1" draw:name="Imagem10" text:anchor-type="char" svg:width="17cm" svg:height="11.497cm" draw:z-index="9"><draw:image xlink:href="Pictures/10000001000003390000022E1CB1BC49.png" xlink:type="simple" xlink:show="embed" xlink:actuate="onLoad" draw:mime-type="image/png"/></draw:frame>.</text:p>
      <text:p text:style-name="P10"><draw:frame draw:style-name="fr1" draw:name="Imagem11" text:anchor-type="char" svg:width="17cm" svg:height="9.499cm" draw:z-index="10"><draw:image xlink:href="Pictures/1000000100000340000001D1214109B3.png" xlink:type="simple" xlink:show="embed" xlink:actuate="onLoad" draw:mime-type="image/png"/></draw:frame><text:soft-page-break/>.</text:p>
      <text:p text:style-name="P10"><draw:frame draw:style-name="fr1" draw:name="Imagem12" text:anchor-type="char" svg:width="17cm" svg:height="9.439cm" draw:z-index="11"><draw:image xlink:href="Pictures/1000000100000340000001CEFF13BEC6.png" xlink:type="simple" xlink:show="embed" xlink:actuate="onLoad" draw:mime-type="image/png"/></draw:frame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Apontar o Windows para o bind9 da VM</text:p>
      <text:p text:style-name="P3"><draw:frame draw:style-name="fr1" draw:name="Imagem13" text:anchor-type="char" svg:width="17cm" svg:height="10.225cm" draw:z-index="12"><draw:image xlink:href="Pictures/1000000100000314000001DAD584A037.png" xlink:type="simple" xlink:show="embed" xlink:actuate="onLoad" draw:mime-type="image/png"/></draw:frame>.</text:p>
      <text:p text:style-name="P3">Validar no windows (agora o DNS resolve sem a linha a apontar no ficheiro hosts do windows)</text:p>
      <text:p text:style-name="P3"><draw:frame draw:style-name="fr2" draw:name="Imagem14" text:anchor-type="char" svg:width="17cm" svg:height="11.446cm" draw:z-index="13"><draw:image xlink:href="Pictures/1000000100000442000002DEADE473A7.png" xlink:type="simple" xlink:show="embed" xlink:actuate="onLoad" draw:mime-type="image/png"/></draw:frame>.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3T18:13:19.181023900</meta:creation-date>
    <dc:date>2026-05-03T20:14:04.065122800</dc:date>
    <meta:editing-duration>PT10M38S</meta:editing-duration>
    <meta:editing-cycles>1</meta:editing-cycles>
    <meta:document-statistic meta:table-count="1" meta:image-count="14" meta:object-count="0" meta:page-count="9" meta:paragraph-count="73" meta:word-count="313" meta:character-count="2069" meta:non-whitespace-character-count="1814"/>
    <meta:generator>LibreOffice/25.8.5.2$Windows_X86_64 LibreOffice_project/9c8b85f387cc00a89945a79c9e6239f32e450ac2</meta:generator>
  </office:meta>
</office:document-meta>
</file>