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A80000008884C5BA28.png" manifest:media-type="image/png"/>
  <manifest:file-entry manifest:full-path="Pictures/10000001000003BA00000402D84CE854.png" manifest:media-type="image/png"/>
  <manifest:file-entry manifest:full-path="Pictures/10000001000002C90000009B2A18030F.png" manifest:media-type="image/png"/>
  <manifest:file-entry manifest:full-path="Pictures/10000001000003BE0000027BA490FB5A.png" manifest:media-type="image/png"/>
  <manifest:file-entry manifest:full-path="Pictures/1000000100000314000001F32D925731.png" manifest:media-type="image/png"/>
  <manifest:file-entry manifest:full-path="Pictures/10000001000003C4000002591408E98F.png" manifest:media-type="image/png"/>
  <manifest:file-entry manifest:full-path="Pictures/10000001000003AE0000027F28EA3D77.png" manifest:media-type="image/png"/>
  <manifest:file-entry manifest:full-path="Pictures/10000001000003BA000001EE5516D302.png" manifest:media-type="image/png"/>
  <manifest:file-entry manifest:full-path="Pictures/1000000100000314000001680BABCD02.png" manifest:media-type="image/png"/>
  <manifest:file-entry manifest:full-path="Pictures/10000001000003B8000000F495228452.png" manifest:media-type="image/png"/>
  <manifest:file-entry manifest:full-path="Pictures/10000001000003BA000002F5355A66ED.png" manifest:media-type="image/png"/>
  <manifest:file-entry manifest:full-path="Pictures/10000001000003BD00000271BAB811DE.png" manifest:media-type="image/png"/>
  <manifest:file-entry manifest:full-path="Pictures/100000010000039E000000BD00713DB5.png" manifest:media-type="image/png"/>
  <manifest:file-entry manifest:full-path="Pictures/10000001000003BF000000ED14FC2DA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a96b" officeooo:paragraph-rsid="001ea96b"/>
    </style:style>
    <style:style style:name="P2" style:family="paragraph" style:parent-style-name="Standard">
      <style:text-properties officeooo:rsid="00253e34" officeooo:paragraph-rsid="00253e34"/>
    </style:style>
    <style:style style:name="P3" style:family="paragraph" style:parent-style-name="Standard">
      <style:text-properties officeooo:rsid="001ef696" officeooo:paragraph-rsid="001ef696"/>
    </style:style>
    <style:style style:name="P4" style:family="paragraph" style:parent-style-name="Standard">
      <style:text-properties officeooo:paragraph-rsid="0020232c"/>
    </style:style>
    <style:style style:name="P5" style:family="paragraph" style:parent-style-name="Standard">
      <style:text-properties officeooo:rsid="00221be2" officeooo:paragraph-rsid="00221be2"/>
    </style:style>
    <style:style style:name="P6" style:family="paragraph" style:parent-style-name="Standard">
      <style:text-properties officeooo:rsid="0022a163" officeooo:paragraph-rsid="0022a163"/>
    </style:style>
    <style:style style:name="P7" style:family="paragraph" style:parent-style-name="Standard">
      <style:text-properties officeooo:rsid="0022ea76" officeooo:paragraph-rsid="0022ea76"/>
    </style:style>
    <style:style style:name="P8" style:family="paragraph" style:parent-style-name="Standard">
      <style:text-properties officeooo:rsid="0023543a" officeooo:paragraph-rsid="0023543a"/>
    </style:style>
    <style:style style:name="P9" style:family="paragraph" style:parent-style-name="Standard">
      <style:text-properties officeooo:rsid="002533f1" officeooo:paragraph-rsid="002533f1"/>
    </style:style>
    <style:style style:name="P10" style:family="paragraph" style:parent-style-name="Standard">
      <style:text-properties officeooo:paragraph-rsid="002533f1"/>
    </style:style>
    <style:style style:name="P11" style:family="paragraph" style:parent-style-name="Standard">
      <style:text-properties officeooo:rsid="00253466" officeooo:paragraph-rsid="00253466"/>
    </style:style>
    <style:style style:name="P12" style:family="paragraph" style:parent-style-name="Standard">
      <style:text-properties officeooo:paragraph-rsid="00253466"/>
    </style:style>
    <style:style style:name="P13" style:family="paragraph" style:parent-style-name="Standard">
      <style:text-properties officeooo:paragraph-rsid="00253e34"/>
    </style:style>
    <style:style style:name="P14" style:family="paragraph" style:parent-style-name="Standard">
      <style:text-properties officeooo:rsid="00258eb5" officeooo:paragraph-rsid="00258eb5"/>
    </style:style>
    <style:style style:name="P15" style:family="paragraph" style:parent-style-name="Standard">
      <style:text-properties officeooo:rsid="0025a517" officeooo:paragraph-rsid="0025a517"/>
    </style:style>
    <style:style style:name="T1" style:family="text">
      <style:text-properties fo:color="#70b8ff" loext:opacity="100%"/>
    </style:style>
    <style:style style:name="T2" style:family="text">
      <style:text-properties officeooo:rsid="0020232c"/>
    </style:style>
    <style:style style:name="T3" style:family="text">
      <style:text-properties officeooo:rsid="002533f1"/>
    </style:style>
    <style:style style:name="T4" style:family="text">
      <style:text-properties officeooo:rsid="00253466"/>
    </style:style>
    <style:style style:name="T5" style:family="text">
      <style:text-properties officeooo:rsid="00253e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fix + Dovecot + Thunderbird</text:p>
      <text:p text:style-name="P1"/>
      <text:p text:style-name="P2">Email users: utilizador1 pw: utilizador ; utilizador2 pw: utilizador</text:p>
      <text:p text:style-name="P1"/>
      <text:p text:style-name="P1">Postfix- recebe e envia e-mails (SMTP)</text:p>
      <text:p text:style-name="P1">Dovecot- armazena e apresenta/mostra os e-mails (IMAP)</text:p>
      <text:p text:style-name="P1">Thunderbird- cliente para o utilizador ler e escrever e-mails</text:p>
      <text:p text:style-name="P1"/>
      <text:p text:style-name="P1">domínio: lab.local</text:p>
      <text:p text:style-name="P1"/>
      <text:p text:style-name="P1"><text:span text:style-name="T1">sudo</text:span> <text:span text:style-name="T1">apt</text:span> <text:span text:style-name="T1">install</text:span> -y postfix postfix mailutils dovecot-core dovecot-imapd dovecot-lmtpd</text:p>
      <text:p text:style-name="P1"/>
      <text:p text:style-name="P3">instalar postfix (internet site &amp; lab.local) e dovecot</text:p>
      <text:p text:style-name="P4"><text:span text:style-name="T2">validar→ postfix: postconf mail_version</text:span></text:p>
      <text:p text:style-name="P4"><text:tab/>→ <text:span text:style-name="T2">dovecot: dovecot --version</text:span></text:p>
      <text:p text:style-name="P3"/>
      <text:p text:style-name="P3"/>
      <text:p text:style-name="P4"><text:span text:style-name="T2">Postfix tem dois ficheiros principais:<text:line-break/>-main.cf – todas opções de config <text:s/>(</text:span>/etc/postfix/main.cf <text:span text:style-name="T2">)</text:span></text:p>
      <text:p text:style-name="P4"><text:span text:style-name="T2">-master.cf – define que serviços correm e em que portas (</text:span>/etc/postfix/master.cf <text:span text:style-name="T2">)</text:span></text:p>
      <text:p text:style-name="P3"/>
      <text:p text:style-name="P3"><draw:frame draw:style-name="fr1" draw:name="Imagem1" text:anchor-type="char" svg:width="13.508cm" svg:height="14.032cm" draw:z-index="0"><draw:image xlink:href="Pictures/10000001000003BA00000402D84CE854.png" xlink:type="simple" xlink:show="embed" xlink:actuate="onLoad" draw:mime-type="image/png"/></draw:frame>.</text:p>
      <text:p text:style-name="P5"/>
      <text:p text:style-name="P5"><text:soft-page-break/></text:p>
      <text:p text:style-name="P5"/>
      <text:p text:style-name="P5">No ficheiro master.cf , porta 25 ativa</text:p>
      <text:p text:style-name="P6"><draw:frame draw:style-name="fr2" draw:name="Imagem2" text:anchor-type="char" svg:width="17cm" svg:height="3.695cm" draw:z-index="1"><draw:image xlink:href="Pictures/10000001000002C90000009B2A18030F.png" xlink:type="simple" xlink:show="embed" xlink:actuate="onLoad" draw:mime-type="image/png"/></draw:frame>ativar porta 587 submission</text:p>
      <text:p text:style-name="P6"><draw:frame draw:style-name="fr2" draw:name="Imagem3" text:anchor-type="char" svg:width="17cm" svg:height="10.765cm" draw:z-index="2"><draw:image xlink:href="Pictures/1000000100000314000001F32D925731.png" xlink:type="simple" xlink:show="embed" xlink:actuate="onLoad" draw:mime-type="image/png"/></draw:frame>smtpd tls security level = encrypt → o cliente é obrigado a usar TLS (STARTTLS)</text:p>
      <text:p text:style-name="P7">smtpd sasl auth enable → permite autenticação</text:p>
      <text:p text:style-name="P7">tls auth only → o login só é aceite depois da ligação estar encriptada</text:p>
      <text:p text:style-name="P7">recipient restrictions = permit_sasl_authenticated, reject → APENAS utilizadores autenticados podem enviar e-mails</text:p>
      <text:p text:style-name="P7">relay_restrictions=permit_sasl_authenticated,reject → permite relay (envio para fora de dominio) apenas a utilizadores autenticados (evita spam e blacklisted IP)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/etc/dovecot/conf.d/</text:p>
      <text:p text:style-name="P8"><text:tab/>|_ sudo nano /etc/dovecot/dovecot.conf (protocol = imap lmtp)</text:p>
      <text:p text:style-name="P8"/>
      <text:p text:style-name="P8">IMAP é superior ao POP3 (protocolo para o mesmo efeito) porque mantém os e-mails no servidor, ao contrário do POP3 que descarrega e apaga</text:p>
      <text:p text:style-name="P8"/>
      <text:p text:style-name="P8"><draw:frame draw:style-name="fr3" draw:name="Imagem4" text:anchor-type="char" svg:width="17cm" svg:height="10.597cm" draw:z-index="3"><draw:image xlink:href="Pictures/10000001000003C4000002591408E98F.png" xlink:type="simple" xlink:show="embed" xlink:actuate="onLoad" draw:mime-type="image/png"/></draw:frame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sudo nano /etc/dovecot/conf.d/10-mail.conf</text:p>
      <text:p text:style-name="P9"/>
      <text:p text:style-name="P9">mail_location = maildir:~/Maildir</text:p>
      <text:p text:style-name="P9">Isto diz ao dovecot para armazenar os e-mails no formato Maildir dentro da pasta home de cada utilizador (igual ao configurado no Postfix)</text:p>
      <text:p text:style-name="P9"><draw:frame draw:style-name="fr3" draw:name="Imagem5" text:anchor-type="char" svg:width="17cm" svg:height="11.531cm" draw:z-index="4"><draw:image xlink:href="Pictures/10000001000003AE0000027F28EA3D77.png" xlink:type="simple" xlink:show="embed" xlink:actuate="onLoad" draw:mime-type="image/png"/></draw:frame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text:span text:style-name="T3">Autenticação (</text:span>/etc/dovecot/conf.d/10-auth.conf <text:span text:style-name="T3">)</text:span></text:p>
      <text:p text:style-name="P9">para já permitir autenticação em texto simples sem TLS</text:p>
      <text:p text:style-name="P9">será alterado mais tarde</text:p>
      <text:p text:style-name="P9"><draw:frame draw:style-name="fr2" draw:name="Imagem6" text:anchor-type="char" svg:width="17cm" svg:height="11.268cm" draw:z-index="5"><draw:image xlink:href="Pictures/10000001000003BE0000027BA490FB5A.png" xlink:type="simple" xlink:show="embed" xlink:actuate="onLoad" draw:mime-type="image/png"/></draw:frame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1">fazer a ligação do postfix ao dovecot para verificar as credenciais dos utilizadores</text:p>
      <text:p text:style-name="P12"><text:span text:style-name="T4">- </text:span>/etc/dovecot/conf.d/10-master.conf</text:p>
      <text:p text:style-name="P12"/>
      <text:p text:style-name="P12"/>
      <text:p text:style-name="P9"><draw:frame draw:style-name="fr2" draw:name="Imagem7" text:anchor-type="char" svg:width="17cm" svg:height="2.469cm" draw:z-index="6"><draw:image xlink:href="Pictures/10000001000003A80000008884C5BA28.png" xlink:type="simple" xlink:show="embed" xlink:actuate="onLoad" draw:mime-type="image/png"/></draw:frame>.</text:p>
      <text:p text:style-name="P9"><draw:frame draw:style-name="fr2" draw:name="Imagem8" text:anchor-type="char" svg:width="17cm" svg:height="8.802cm" draw:z-index="7"><draw:image xlink:href="Pictures/10000001000003BA000001EE5516D302.png" xlink:type="simple" xlink:show="embed" xlink:actuate="onLoad" draw:mime-type="image/png"/></draw:frame>.</text:p>
      <text:p text:style-name="P2">Garantir que o Thunderbird reconhece automaticamente as pastas especiais (Enviados,Lixo,etc)</text:p>
      <text:p text:style-name="P13"><text:span text:style-name="T5">- </text:span><text:span text:style-name="T1">sudo</text:span> <text:span text:style-name="T1">nano</text:span> /etc/dovecot/conf.d/15-mailboxes.conf</text:p>
      <text:p text:style-name="P13"><draw:frame draw:style-name="fr3" draw:name="Imagem9" text:anchor-type="char" svg:width="17cm" svg:height="7.766cm" draw:z-index="8"><draw:image xlink:href="Pictures/1000000100000314000001680BABCD02.png" xlink:type="simple" xlink:show="embed" xlink:actuate="onLoad" draw:mime-type="image/png"/></draw:frame>.</text:p>
      <text:p text:style-name="P13"/>
      <text:p text:style-name="P13"/>
      <text:p text:style-name="P2"><text:soft-page-break/>Criar utilizador1 e utilizador2</text:p>
      <text:p text:style-name="P2"><draw:frame draw:style-name="fr2" draw:name="Imagem10" text:anchor-type="char" svg:width="17cm" svg:height="4.355cm" draw:z-index="9"><draw:image xlink:href="Pictures/10000001000003B8000000F495228452.png" xlink:type="simple" xlink:show="embed" xlink:actuate="onLoad" draw:mime-type="image/png"/></draw:frame>.</text:p>
      <text:p text:style-name="P14">Se o comando sudo postfix check correr sem erros/warnings, reiniciar os serviços postfix e dovecot e verificar os seus status</text:p>
      <text:p text:style-name="P14"><draw:frame draw:style-name="fr2" draw:name="Imagem11" text:anchor-type="char" svg:width="17cm" svg:height="13.488cm" draw:z-index="10"><draw:image xlink:href="Pictures/10000001000003BA000002F5355A66ED.png" xlink:type="simple" xlink:show="embed" xlink:actuate="onLoad" draw:mime-type="image/png"/></draw:frame>.</text:p>
      <text:p text:style-name="P14"><draw:frame draw:style-name="fr3" draw:name="Imagem12" text:anchor-type="char" svg:width="17cm" svg:height="11.102cm" draw:z-index="11"><draw:image xlink:href="Pictures/10000001000003BD00000271BAB811DE.png" xlink:type="simple" xlink:show="embed" xlink:actuate="onLoad" draw:mime-type="image/png"/></draw:frame><text:soft-page-break/>.</text:p>
      <text:p text:style-name="P14">Verificar que as portas estão abertas:</text:p>
      <text:p text:style-name="P14">sudo ss -tlnp | grep -E ‘25|587|143’</text:p>
      <text:p text:style-name="P14"><draw:frame draw:style-name="fr2" draw:name="Imagem13" text:anchor-type="char" svg:width="17cm" svg:height="3.47cm" draw:z-index="12"><draw:image xlink:href="Pictures/100000010000039E000000BD00713DB5.png" xlink:type="simple" xlink:show="embed" xlink:actuate="onLoad" draw:mime-type="image/png"/></draw:frame>.<text:line-break/>Instalar rsyslog → enable e start</text:p>
      <text:p text:style-name="P2"/>
      <text:p text:style-name="P13"><draw:frame draw:style-name="fr2" draw:name="Imagem14" text:anchor-type="char" svg:width="17cm" svg:height="4.2cm" draw:z-index="13"><draw:image xlink:href="Pictures/10000001000003BF000000ED14FC2DA8.png" xlink:type="simple" xlink:show="embed" xlink:actuate="onLoad" draw:mime-type="image/png"/></draw:frame></text:p>
      <text:p text:style-name="P15">Postfix não gera logs por erro de loop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3T20:39:17.924568400</meta:creation-date>
    <dc:date>2026-05-04T00:26:18.372259900</dc:date>
    <meta:editing-duration>PT10M56S</meta:editing-duration>
    <meta:editing-cycles>1</meta:editing-cycles>
    <meta:document-statistic meta:table-count="0" meta:image-count="14" meta:object-count="0" meta:page-count="8" meta:paragraph-count="48" meta:word-count="334" meta:character-count="2323" meta:non-whitespace-character-count="2032"/>
    <meta:generator>LibreOffice/25.8.5.2$Windows_X86_64 LibreOffice_project/9c8b85f387cc00a89945a79c9e6239f32e450ac2</meta:generator>
  </office:meta>
</office:document-meta>
</file>