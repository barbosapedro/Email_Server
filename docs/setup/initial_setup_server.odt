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50000036DE809E087.png" manifest:media-type="image/png"/>
  <manifest:file-entry manifest:full-path="Pictures/10000001000003B100000137223677B8.png" manifest:media-type="image/png"/>
  <manifest:file-entry manifest:full-path="Pictures/10000001000003B6000001632EF8003C.png" manifest:media-type="image/png"/>
  <manifest:file-entry manifest:full-path="Pictures/100000010000035B000001BD81F2207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0e03" officeooo:paragraph-rsid="00090e03"/>
    </style:style>
    <style:style style:name="P2" style:family="paragraph" style:parent-style-name="Standard">
      <style:text-properties officeooo:rsid="000b57a0" officeooo:paragraph-rsid="000b57a0"/>
    </style:style>
    <style:style style:name="P3" style:family="paragraph" style:parent-style-name="Standard">
      <style:text-properties officeooo:rsid="000a5428" officeooo:paragraph-rsid="000a5428"/>
    </style:style>
    <style:style style:name="P4" style:family="paragraph" style:parent-style-name="Standard">
      <style:text-properties officeooo:rsid="000aebf2" officeooo:paragraph-rsid="000aeb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Server 24.04</text:p>
      <text:p text:style-name="P1">RAM: 4096 MB</text:p>
      <text:p text:style-name="P1">DISK: 40 GB</text:p>
      <text:p text:style-name="P1"/>
      <text:p text:style-name="P1">hostname: mailserver</text:p>
      <text:p text:style-name="P1">username: labadmin</text:p>
      <text:p text:style-name="P1">password: labadmin123</text:p>
      <text:p text:style-name="P1">ip:192.168.1.61</text:p>
      <text:p text:style-name="P2">dns: mailserver.lab.local</text:p>
      <text:p text:style-name="P1"/>
      <text:p text:style-name="P1">ssh windows → ubuntu server</text:p>
      <text:p text:style-name="P1"><draw:frame draw:style-name="fr1" draw:name="Imagem1" text:anchor-type="char" svg:width="17cm" svg:height="16.547cm" draw:z-index="0"><draw:image xlink:href="Pictures/10000001000003850000036DE809E087.png" xlink:type="simple" xlink:show="embed" xlink:actuate="onLoad" draw:mime-type="image/png"/></draw:frame>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P estático servidor para o DNS e Thunderbird</text:p>
      <text:p text:style-name="P3"><draw:frame draw:style-name="fr1" draw:name="Imagem2" text:anchor-type="char" svg:width="17cm" svg:height="6.352cm" draw:z-index="1"><draw:image xlink:href="Pictures/10000001000003B6000001632EF8003C.png" xlink:type="simple" xlink:show="embed" xlink:actuate="onLoad" draw:mime-type="image/png"/></draw:frame>.</text:p>
      <text:p text:style-name="P3">Adicionar local dns ficheiro hosts server</text:p>
      <text:p text:style-name="P3"><draw:frame draw:style-name="fr2" draw:name="Imagem3" text:anchor-type="char" svg:width="17cm" svg:height="5.593cm" draw:z-index="2"><draw:image xlink:href="Pictures/10000001000003B100000137223677B8.png" xlink:type="simple" xlink:show="embed" xlink:actuate="onLoad" draw:mime-type="image/png"/></draw:frame>.</text:p>
      <text:p text:style-name="P4">Ficheiro hosts do windows</text:p>
      <text:p text:style-name="P4"><draw:frame draw:style-name="fr1" draw:name="Imagem4" text:anchor-type="char" svg:width="17cm" svg:height="8.807cm" draw:z-index="3"><draw:image xlink:href="Pictures/100000010000035B000001BD81F22070.png" xlink:type="simple" xlink:show="embed" xlink:actuate="onLoad" draw:mime-type="image/png"/></draw:frame>.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7:06:11.148273400</meta:creation-date>
    <meta:editing-duration>PT9M10S</meta:editing-duration>
    <meta:editing-cycles>2</meta:editing-cycles>
    <meta:generator>LibreOffice/25.8.5.2$Windows_X86_64 LibreOffice_project/9c8b85f387cc00a89945a79c9e6239f32e450ac2</meta:generator>
    <dc:date>2026-05-03T17:58:00.665887600</dc:date>
    <meta:document-statistic meta:table-count="0" meta:image-count="4" meta:object-count="0" meta:page-count="3" meta:paragraph-count="16" meta:word-count="45" meta:character-count="283" meta:non-whitespace-character-count="254"/>
  </office:meta>
</office:document-meta>
</file>